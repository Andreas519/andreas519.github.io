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B7000000E0DDCC2AD9.png" manifest:media-type="image/png"/>
  <manifest:file-entry manifest:full-path="Pictures/1000000100000365000001C12F27332C.png" manifest:media-type="image/png"/>
  <manifest:file-entry manifest:full-path="Pictures/1000000100000145000000E1273166BF.png" manifest:media-type="image/png"/>
  <manifest:file-entry manifest:full-path="Pictures/10000001000001FB0000014C2D125F52.png" manifest:media-type="image/png"/>
  <manifest:file-entry manifest:full-path="Pictures/1000000000000207000001409084A37D.png" manifest:media-type="image/png"/>
  <manifest:file-entry manifest:full-path="Pictures/10000000000001FE00000239C63E0A2E.png" manifest:media-type="image/png"/>
  <manifest:file-entry manifest:full-path="Pictures/1000000000000237000000ED1C920A5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b09" officeooo:paragraph-rsid="00008b09"/>
    </style:style>
    <style:style style:name="P2" style:family="paragraph" style:parent-style-name="Standard">
      <style:text-properties officeooo:rsid="0002796c" officeooo:paragraph-rsid="0002796c"/>
    </style:style>
    <style:style style:name="P3" style:family="paragraph" style:parent-style-name="Standard">
      <style:text-properties fo:color="#c9211e" loext:opacity="100%" style:font-name="Courier New" officeooo:rsid="00008b09" officeooo:paragraph-rsid="0002796c"/>
    </style:style>
    <style:style style:name="P4" style:family="paragraph" style:parent-style-name="Standard">
      <style:text-properties style:font-name="Courier New" officeooo:rsid="00008b09" officeooo:paragraph-rsid="0002796c" fo:background-color="#000000"/>
    </style:style>
    <style:style style:name="P5" style:family="paragraph" style:parent-style-name="Standard">
      <style:text-properties fo:font-variant="normal" fo:text-transform="none" fo:color="#ff4000" loext:opacity="100%" style:font-name="Arial Black" fo:font-size="9.75pt" fo:letter-spacing="normal" fo:font-style="normal" fo:font-weight="normal" officeooo:rsid="00008b09" officeooo:paragraph-rsid="00008b09" fo:background-color="#ffffff"/>
    </style:style>
    <style:style style:name="P6" style:family="paragraph" style:parent-style-name="Standard">
      <style:text-properties officeooo:rsid="00030716" officeooo:paragraph-rsid="00030716"/>
    </style:style>
    <style:style style:name="P7" style:family="paragraph" style:parent-style-name="Standard">
      <style:text-properties officeooo:rsid="00008b09" officeooo:paragraph-rsid="0001295a"/>
    </style:style>
    <style:style style:name="P8" style:family="paragraph" style:parent-style-name="Standard">
      <style:text-properties officeooo:rsid="00047362" officeooo:paragraph-rsid="00047362"/>
    </style:style>
    <style:style style:name="P9" style:family="paragraph" style:parent-style-name="Standard">
      <style:paragraph-properties fo:break-before="page"/>
      <style:text-properties officeooo:rsid="00008b09" officeooo:paragraph-rsid="00008b09"/>
    </style:style>
    <style:style style:name="P10" style:family="paragraph" style:parent-style-name="Standard">
      <style:text-properties officeooo:rsid="00078255" officeooo:paragraph-rsid="00078255"/>
    </style:style>
    <style:style style:name="P11" style:family="paragraph" style:parent-style-name="Standard">
      <style:paragraph-properties fo:break-before="page"/>
      <style:text-properties style:font-name="Courier New" fo:font-size="12pt" fo:font-weight="bold" officeooo:rsid="00008b09" officeooo:paragraph-rsid="00008b09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Courier New" fo:font-size="12pt" officeooo:rsid="00008b09" officeooo:paragraph-rsid="00008b09" style:font-size-asian="12pt" style:font-size-complex="12pt"/>
    </style:style>
    <style:style style:name="P13" style:family="paragraph" style:parent-style-name="Text_20_body">
      <style:text-properties style:font-name="Courier New" fo:font-size="12pt" style:font-size-asian="12pt" style:font-size-complex="12pt"/>
    </style:style>
    <style:style style:name="P14" style:family="paragraph" style:parent-style-name="Text_20_body">
      <style:text-properties style:font-name="Courier New" fo:font-size="12pt" fo:font-weight="bold" officeooo:paragraph-rsid="00047362" style:font-size-asian="12pt" style:font-weight-asian="bold" style:font-size-complex="12pt" style:font-weight-complex="bold"/>
    </style:style>
    <style:style style:name="P15" style:family="paragraph" style:parent-style-name="Text_20_body">
      <style:text-properties style:font-name="Courier New" fo:font-size="12pt" officeooo:paragraph-rsid="00047362" style:font-size-asian="12pt" style:font-size-complex="12pt"/>
    </style:style>
    <style:style style:name="P16" style:family="paragraph" style:parent-style-name="Text_20_body">
      <style:text-properties style:font-name="Courier New" fo:font-size="12pt" officeooo:paragraph-rsid="0004a909" style:font-size-asian="12pt" style:font-size-complex="12pt"/>
    </style:style>
    <style:style style:name="P17" style:family="paragraph" style:parent-style-name="Preformatted_20_Text">
      <style:paragraph-properties fo:margin-top="0cm" fo:margin-bottom="0.499cm" style:contextual-spacing="false"/>
      <style:text-properties style:font-name="Courier New" fo:font-size="12pt" style:font-size-asian="12pt" style:font-size-complex="12pt"/>
    </style:style>
    <style:style style:name="P18" style:family="paragraph" style:parent-style-name="Text_20_body" style:list-style-name="L1">
      <style:text-properties style:font-name="Courier New" fo:font-size="12pt" officeooo:rsid="00078255" officeooo:paragraph-rsid="00078255" style:font-size-asian="12pt" style:font-size-complex="12pt"/>
    </style:style>
    <style:style style:name="P19" style:family="paragraph" style:parent-style-name="Text_20_body">
      <style:text-properties style:font-name="Courier New" fo:font-size="12pt" officeooo:rsid="00078255" officeooo:paragraph-rsid="00078255" style:font-size-asian="12pt" style:font-size-complex="12pt"/>
    </style:style>
    <style:style style:name="P20" style:family="paragraph" style:parent-style-name="Text_20_body">
      <style:text-properties style:font-name="Courier New" fo:font-weight="bold" officeooo:paragraph-rsid="00094684" style:font-weight-asian="bold" style:font-weight-complex="bold"/>
    </style:style>
    <style:style style:name="P21" style:family="paragraph" style:parent-style-name="Text_20_body">
      <style:text-properties style:font-name="Courier New" officeooo:paragraph-rsid="00094684"/>
    </style:style>
    <style:style style:name="P22" style:family="paragraph" style:parent-style-name="Text_20_body">
      <style:text-properties style:font-name="Courier New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rstellung der CH340-Treiber-Missere</text:p>
      <text:p text:style-name="P1"/>
      <text:p text:style-name="P1">In Thonny wird nach der richtiger Interpreterkonfiguration ...</text:p>
      <text:p text:style-name="P1">...<draw:frame draw:style-name="fr1" draw:name="Bild3" text:anchor-type="char" svg:width="17cm" svg:height="8.782cm" draw:z-index="0"><draw:image xlink:href="Pictures/1000000100000365000001C12F27332C.png" xlink:type="simple" xlink:show="embed" xlink:actuate="onLoad" draw:mime-type="image/png"/></draw:frame>in der Kommandozeile eine Fehlermeldung angezeigt.</text:p>
      <text:p text:style-name="P1"/>
      <text:p text:style-name="P1"/>
      <text:p text:style-name="P2">In der Arduino-IDE wird beim „Hochladen“ folgende Fehlermeldung angezeigt.</text:p>
      <text:p text:style-name="P1"/>
      <text:p text:style-name="P2"><draw:frame draw:style-name="fr2" draw:name="Bild2 Kopie 1" text:anchor-type="char" svg:x="-0.148cm" svg:y="0cm" svg:width="17cm" svg:height="2.602cm" draw:z-index="1"><draw:image xlink:href="Pictures/10000001000005B7000000E0DDCC2AD9.png" xlink:type="simple" xlink:show="embed" xlink:actuate="onLoad" draw:mime-type="image/png"/></draw:frame><text:line-break/>Auszug aus der Fehlermeldung:</text:p>
      <text:p text:style-name="P3"><text:span text:style-name="T1">...<text:line-break/>PermissionErro</text:span>r(13, 'Ein an das System angeschlossenes Ger�t funktioniert nicht.', None, 31) ...</text:p>
      <text:p text:style-name="P4"/>
      <text:p text:style-name="P2">Der Versuch, den „Seriellen Monitor“ zu öffnen, liefert folgende Meldung:</text:p>
      <text:p text:style-name="P5">Port-Monitor-Fehler: Der Befehl 'open' ist fehlgeschlagen: Invalid serial port. Could not connect to COM4 serial port.</text:p>
      <text:p text:style-name="P1"/>
      <text:p text:style-name="P6"><text:soft-page-break/>Im Gerätemanager erscheinr der COM-Port:<text:line-break/><draw:frame draw:style-name="fr3" draw:name="Bild1" text:anchor-type="as-char" svg:width="8.601cm" svg:height="5.953cm" draw:z-index="2"><draw:image xlink:href="Pictures/1000000100000145000000E1273166BF.png" xlink:type="simple" xlink:show="embed" xlink:actuate="onLoad" draw:mime-type="image/png"/></draw:frame></text:p>
      <text:p text:style-name="P6"/>
      <text:p text:style-name="P6"><draw:frame draw:style-name="fr1" draw:name="Bild4" text:anchor-type="char" svg:width="13.416cm" svg:height="8.784cm" draw:z-index="3"><draw:image xlink:href="Pictures/10000001000001FB0000014C2D125F52.png" xlink:type="simple" xlink:show="embed" xlink:actuate="onLoad" draw:mime-type="image/png"/></draw:frame></text:p>
      <text:p text:style-name="P7"/>
      <text:p text:style-name="P6"><text:soft-page-break/>Im Gerätemanager ist die COM-Schnittstelle verschwunden.<text:line-break/><draw:frame draw:style-name="fr4" draw:name="Bild5" text:anchor-type="as-char" svg:y="-8.213cm" svg:width="10.986cm" svg:height="6.773cm" draw:z-index="4"><draw:image xlink:href="Pictures/1000000000000207000001409084A37D.png" xlink:type="simple" xlink:show="embed" xlink:actuate="onLoad" draw:mime-type="image/png"/></draw:frame></text:p>
      <text:p text:style-name="P6"><text:soft-page-break/><draw:frame draw:style-name="fr3" draw:name="Bild6" text:anchor-type="as-char" svg:width="10.795cm" svg:height="12.044cm" draw:z-index="5"><draw:image xlink:href="Pictures/10000000000001FE00000239C63E0A2E.png" xlink:type="simple" xlink:show="embed" xlink:actuate="onLoad" draw:mime-type="image/png"/></draw:frame></text:p>
      <text:p text:style-name="P6"/>
      <text:p text:style-name="P8">c:\windows\system32\Drivers</text:p>
      <text:p text:style-name="P1"/>
      <text:p text:style-name="P1"/>
      <text:p text:style-name="P1">dir c:\windows\system32\Drivers\CH341S64.SYS</text:p>
      <text:p text:style-name="P1"><text:s/>Datenträger in Laufwerk C: ist Windows</text:p>
      <text:p text:style-name="P1"><text:s/>Volumeseriennummer: C072-7A2B</text:p>
      <text:p text:style-name="P1"/>
      <text:p text:style-name="P1"><text:s/>Verzeichnis von c:\windows\system32\Drivers</text:p>
      <text:p text:style-name="P1"/>
      <text:p text:style-name="P1"><text:soft-page-break/>04.11.2024 <text:s/>01:15 <text:s text:c="11"/>84.864 CH341S64.SYS</text:p>
      <text:p text:style-name="P1"><text:s text:c="15"/>1 Datei(en), <text:s text:c="8"/>84.864 Bytes</text:p>
      <text:p text:style-name="P1">0 Verzeichnis(se), 17.757.818.880 Bytes frei</text:p>
      <text:p text:style-name="P1"/>
      <text:p text:style-name="P1"><draw:frame draw:style-name="fr3" draw:name="Bild7" text:anchor-type="as-char" svg:width="12.002cm" svg:height="5.017cm" draw:z-index="6"><draw:image xlink:href="Pictures/1000000000000237000000ED1C920A57.png" xlink:type="simple" xlink:show="embed" xlink:actuate="onLoad" draw:mime-type="image/png"/></draw:frame></text:p>
      <text:p text:style-name="P1"/>
      <text:section text:style-name="Sect1" text:name="Bereich2">
        <text:p text:style-name="P9"/>
      </text:section>
      <text:p text:style-name="P1"/>
      <text:p text:style-name="P1"/>
      <text:p text:style-name="P10">Ich habe:</text:p>
      <text:p text:style-name="P10"/>
      <text:p text:style-name="P11">dir /A c:\windows\system32\CH341PT.DLL</text:p>
      <text:p text:style-name="P12"><text:s/>Verzeichnis von c:\windows\system32</text:p>
      <text:p text:style-name="P12">05.05.2026 <text:s/>11:06 <text:s text:c="12"/>6.712 CH341PT.DLL</text:p>
      <text:p text:style-name="P12">1 Datei(en), <text:s text:c="9"/>6.712 Bytes</text:p>
      <text:section text:style-name="Sect2" text:name="Bereich1">
        <text:p text:style-name="P13"/>
      </text:section>
      <text:p text:style-name="P13"/>
      <text:p text:style-name="P14">dir /S /A C:\windows\system32\ch3*.*</text:p>
      <text:p text:style-name="P15"><text:span text:style-name="T2"> </text:span>Datenträger in Laufwerk C: ist Windows Volumeseriennummer: C072-7A2B</text:p>
      <text:p text:style-name="P13">Verzeichnis von C:\windows\system32</text:p>
      <text:p text:style-name="P15">01.03.2022 <text:s/>17:00 <text:s text:c="11"/>51.776 CH341PORTS.DLL<text:line-break/>04.11.2024 <text:s/>02:15 <text:s text:c="11"/>83.344 CH341PORTSA64.DLL<text:line-break/>05.05.2026 <text:s/>11:06 <text:s text:c="12"/>6.712 CH341PT.DLL<text:line-break/>04.11.2024 <text:s/>02:15 <text:s text:c="11"/>78.168 CH341PTA64.DLL<text:line-break/>05.05.2026 <text:s/>11:06 <text:s text:c="11"/>20.089 CH341SER.VXD<text:line-break/>28.09.2021 <text:s/>03:08 <text:s text:c="11"/>60.488 CH343PORTSA64.DLL<text:line-break/>28.09.2021 <text:s/>03:08 <text:s text:c="11"/>91.208 CH343PT.DLL<text:line-break/></text:p>
      <text:p text:style-name="P13">Verzeichnis von C:\windows\system32\drivers</text:p>
      <text:p text:style-name="P13">04.11.2024 <text:s/>01:15 <text:s text:c="11"/>84.864 CH341S64.SYS<text:line-break/>05.05.2026 <text:s/>11:06 <text:s text:c="11"/>19.680 CH341S98.SYS<text:line-break/>05.05.2026 <text:s/>11:06 <text:s text:c="11"/>41.472 CH341SER.SYS<text:line-break/>28.09.2021 <text:s/>03:08 <text:s text:c="11"/>75.336 CH343S64.SYS<text:line-break/></text:p>
      <text:p text:style-name="P13">Verzeichnis von C:\windows\system32\DriverStore\FileRepository</text:p>
      <text:p text:style-name="P13">29.06.2026 <text:s/>12:16 <text:s text:c="13"/>ch341ser.inf_amd64_084c012580251feb<text:line-break/>29.06.2026 <text:s/>12:16 <text:s text:c="14"/>420 ch341ser.inf_amd64_084c012580251feb.ini<text:line-break/>29.06.2026 <text:s/>11:38 <text:s text:c="13"/>ch341ser.inf_amd64_34a3206305b40d57<text:line-break/><text:soft-page-break/>29.06.2026 <text:s/>11:38 <text:s text:c="14"/>768 ch341ser.inf_amd64_34a3206305b40d57.ini<text:line-break/>22.02.2026 <text:s/>19:21 <text:s text:c="13"/>ch343ser.inf_amd64_854b94233e76fc2e<text:line-break/>22.02.2026 <text:s/>19:21 <text:s text:c="14"/>652 ch343ser.inf_amd64_854b94233e76fc2e.ini<text:line-break/></text:p>
      <text:p text:style-name="P13">Verzeichnis von C:\windows\system32\DriverStore\FileRepository\ch341ser.inf_amd64_084c012580251feb</text:p>
      <text:p text:style-name="P16">05.05.2026 <text:s/>11:06 <text:s text:c="11"/>59.904 CH341S64.SYS<text:line-break/>05.05.2026 <text:s/>11:06 <text:s text:c="11"/>10.466 CH341SER.CAT<text:line-break/>05.05.2026 <text:s/>11:06 <text:s text:c="12"/>6.678 CH341SER.INF</text:p>
      <text:p text:style-name="P13">Verzeichnis von C:\windows\system32\DriverStore\FileRepository\ch341ser.inf_amd64_34a3206305b40d57</text:p>
      <text:p text:style-name="P13">04.11.2024 <text:s/>01:15 <text:s text:c="11"/>83.344 CH341PORTSA64.DLL 04.11.2024 <text:s/>01:15 <text:s text:c="11"/>59.760 CH341PT.DLL 04.11.2024 <text:s/>01:15 <text:s text:c="11"/>78.168 CH341PTA64.DLL 04.11.2024 <text:s/>01:15 <text:s text:c="11"/>84.864 CH341S64.SYS 04.11.2024 <text:s/>01:15 <text:s text:c="11"/>14.494 CH341SER.CAT 04.11.2024 <text:s/>01:08 <text:s text:c="12"/>9.331 CH341SER.INF 6 Datei(en), <text:s text:c="7"/>329.961 Bytes</text:p>
      <text:p text:style-name="P13">Verzeichnis von C:\windows\system32\DriverStore\FileRepository\ch343ser.inf_amd64_854b94233e76fc2e</text:p>
      <text:p text:style-name="P13">28.09.2021 <text:s/>03:08 <text:s text:c="11"/>60.488 CH343PORTSA64.DLL 28.09.2021 <text:s/>03:08 <text:s text:c="11"/>91.208 CH343PT.DLL 28.09.2021 <text:s/>03:08 <text:s text:c="11"/>75.336 CH343S64.SYS 28.09.2021 <text:s/>03:08 <text:s text:c="11"/>13.768 CH343SER.CAT 13.09.2021 <text:s/>19:35 <text:s text:c="12"/>8.450 ch343ser.inf 5 Datei(en), <text:s text:c="7"/>249.250 Bytes</text:p>
      <text:p text:style-name="P17"><text:s/>Anzahl der angezeigten Dateien:<text:line-break/> 28 Datei(en), <text:s text:c="5"/>1.271.236 Bytes<text:line-break/> 3 Verzeichnis(se), 17.759.416.320 Bytes frei</text:p>
      <text:list text:style-name="L1">
        <text:list-item>
          <text:p text:style-name="P18">COMx freigemacht</text:p>
        </text:list-item>
        <text:list-item>
          <text:p text:style-name="P18">COMx deaktiviert</text:p>
        </text:list-item>
        <text:list-item>
          <text:p text:style-name="P18">Treiber per setup.exe deinstalliert</text:p>
        </text:list-item>
        <text:list-item>
          <text:p text:style-name="P18">Neustart</text:p>
        </text:list-item>
        <text:list-item>
          <text:p text:style-name="P18">Treiber per setup.exe installiert</text:p>
        </text:list-item>
        <text:list-item>
          <text:p text:style-name="P18"><text:soft-page-break/>Gerät an COMx durch einstecken aktiviert</text:p>
        </text:list-item>
        <text:list-item>
          <text:p text:style-name="P18">im Gerätemanager Version überprüft</text:p>
        </text:list-item>
        <text:list-item>
          <text:p text:style-name="P18">Thonny gestartet – läuft</text:p>
        </text:list-item>
      </text:list>
      <text:p text:style-name="P19"/>
      <text:p text:style-name="P20">driverquery|find /I "ch34"</text:p>
      <text:p text:style-name="P21">CH341SER_A64 CH341SER_A64 <text:s text:c="10"/>Kernel <text:s text:c="7"/>26.01.2015 11:25:18</text:p>
      <text:p text:style-name="P21">CH343SER_A64 CH343SER_A64 <text:s text:c="10"/>Kernel <text:s text:c="7"/>09.09.2021 14:11:42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9T10:31:04.680549800</meta:creation-date>
    <dc:date>2026-06-29T13:45:56.989951800</dc:date>
    <meta:editing-duration>PT1H3M44S</meta:editing-duration>
    <meta:editing-cycles>6</meta:editing-cycles>
    <meta:generator>LibreOffice/26.2.4.2$Windows_X86_64 LibreOffice_project/0229ac93fcf0d7cbc6376066c6f35021cef002dc</meta:generator>
    <meta:document-statistic meta:table-count="0" meta:image-count="7" meta:object-count="0" meta:page-count="9" meta:paragraph-count="51" meta:word-count="342" meta:character-count="3912" meta:non-whitespace-character-count="3111"/>
  </office:meta>
</office:document-meta>
</file>