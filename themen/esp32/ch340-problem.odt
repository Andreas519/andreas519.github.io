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B7000000E0DDCC2AD9.png" manifest:media-type="image/png"/>
  <manifest:file-entry manifest:full-path="Pictures/1000000100000365000001C12F27332C.png" manifest:media-type="image/png"/>
  <manifest:file-entry manifest:full-path="Pictures/1000000100000145000000E1273166BF.png" manifest:media-type="image/png"/>
  <manifest:file-entry manifest:full-path="Pictures/10000001000001FB0000014C2D125F52.png" manifest:media-type="image/png"/>
  <manifest:file-entry manifest:full-path="Pictures/1000000000000207000001409084A37D.png" manifest:media-type="image/png"/>
  <manifest:file-entry manifest:full-path="Pictures/10000000000001FE00000239C63E0A2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b09" officeooo:paragraph-rsid="00008b09"/>
    </style:style>
    <style:style style:name="P2" style:family="paragraph" style:parent-style-name="Standard">
      <style:text-properties officeooo:rsid="0002796c" officeooo:paragraph-rsid="0002796c"/>
    </style:style>
    <style:style style:name="P3" style:family="paragraph" style:parent-style-name="Standard">
      <style:text-properties fo:color="#c9211e" loext:opacity="100%" style:font-name="Courier New" officeooo:rsid="00008b09" officeooo:paragraph-rsid="0002796c"/>
    </style:style>
    <style:style style:name="P4" style:family="paragraph" style:parent-style-name="Standard">
      <style:text-properties style:font-name="Courier New" officeooo:rsid="00008b09" officeooo:paragraph-rsid="0002796c" fo:background-color="#000000"/>
    </style:style>
    <style:style style:name="P5" style:family="paragraph" style:parent-style-name="Standard">
      <style:text-properties officeooo:paragraph-rsid="00008b09"/>
    </style:style>
    <style:style style:name="P6" style:family="paragraph" style:parent-style-name="Standard">
      <style:text-properties officeooo:rsid="00030716" officeooo:paragraph-rsid="00030716"/>
    </style:style>
    <style:style style:name="P7" style:family="paragraph" style:parent-style-name="Standard">
      <style:text-properties officeooo:rsid="00008b09" officeooo:paragraph-rsid="0001295a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variant="normal" fo:text-transform="none" fo:color="#ff4000" loext:opacity="100%" fo:font-family="'Arial Black'" style:font-family-generic="swiss" style:font-pitch="variable" fo:font-size="9.75pt" fo:letter-spacing="normal" fo:font-style="normal" fo:font-weight="normal" officeooo:rsid="00008b09" fo:background-color="#ffff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stellung der CH340-Treiber-Missere</text:p>
      <text:p text:style-name="P1"/>
      <text:p text:style-name="P1">In Thonny wird nach der richtiger Interpreterkonfiguration ...</text:p>
      <text:p text:style-name="P1">...<draw:frame draw:style-name="fr1" draw:name="Bild3" text:anchor-type="char" svg:width="17cm" svg:height="8.782cm" draw:z-index="0"><draw:image xlink:href="Pictures/1000000100000365000001C12F27332C.png" xlink:type="simple" xlink:show="embed" xlink:actuate="onLoad" draw:mime-type="image/png"/></draw:frame>in der Kommandozeile eine Fehlermeldung angezeigt.</text:p>
      <text:p text:style-name="P1"/>
      <text:p text:style-name="P1"/>
      <text:p text:style-name="P2">In der Arduino-IDE wird beim „Hochladen“ folgende Fehlermeldung angezeigt.</text:p>
      <text:p text:style-name="P1"/>
      <text:p text:style-name="P2"><draw:frame draw:style-name="fr2" draw:name="Bild2 Kopie 1" text:anchor-type="char" svg:x="-0.148cm" svg:y="0cm" svg:width="17cm" svg:height="2.602cm" draw:z-index="1"><draw:image xlink:href="Pictures/10000001000005B7000000E0DDCC2AD9.png" xlink:type="simple" xlink:show="embed" xlink:actuate="onLoad" draw:mime-type="image/png"/></draw:frame><text:line-break/>Auszug aus der Fehlermeldung:</text:p>
      <text:p text:style-name="P3"><text:span text:style-name="T1">...<text:line-break/>PermissionErro</text:span>r(13, 'Ein an das System angeschlossenes Ger�t funktioniert nicht.', None, 31) ...</text:p>
      <text:p text:style-name="P4"/>
      <text:p text:style-name="P2">Der Versuch, den „Seriellen Monitor“ zu öffnen, liefert folgende Meldung:</text:p>
      <text:p text:style-name="P5"><text:span text:style-name="T2">Port-Monitor-Fehler: Der Befehl 'open' ist fehlgeschlagen: Invalid serial port. Could not </text:span><text:span text:style-name="T2">connect to COM4 serial port.</text:span></text:p>
      <text:p text:style-name="P1"/>
      <text:p text:style-name="P6"><text:soft-page-break/>Im Gerätemanager erscheinr der COM-Port:<text:line-break/><draw:frame draw:style-name="fr3" draw:name="Bild1" text:anchor-type="as-char" svg:width="8.601cm" svg:height="5.953cm" draw:z-index="2"><draw:image xlink:href="Pictures/1000000100000145000000E1273166BF.png" xlink:type="simple" xlink:show="embed" xlink:actuate="onLoad" draw:mime-type="image/png"/></draw:frame></text:p>
      <text:p text:style-name="P6"/>
      <text:p text:style-name="P6"><draw:frame draw:style-name="fr4" draw:name="Bild4" text:anchor-type="char" svg:width="13.416cm" svg:height="8.784cm" draw:z-index="3"><draw:image xlink:href="Pictures/10000001000001FB0000014C2D125F52.png" xlink:type="simple" xlink:show="embed" xlink:actuate="onLoad" draw:mime-type="image/png"/></draw:frame></text:p>
      <text:p text:style-name="P7"/>
      <text:p text:style-name="P6">Im Gerätemanager ist die COM-Schnittstelle verschwunden.<text:line-break/><draw:frame draw:style-name="fr5" draw:name="Bild5" text:anchor-type="as-char" svg:y="-8.213cm" svg:width="10.986cm" svg:height="6.773cm" draw:z-index="4"><draw:image xlink:href="Pictures/1000000000000207000001409084A37D.png" xlink:type="simple" xlink:show="embed" xlink:actuate="onLoad" draw:mime-type="image/png"/></draw:frame></text:p>
      <text:p text:style-name="P6"><draw:frame draw:style-name="fr4" draw:name="Bild6" text:anchor-type="char" svg:width="10.795cm" svg:height="12.044cm" draw:z-index="5"><draw:image xlink:href="Pictures/10000000000001FE00000239C63E0A2E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9T10:31:04.680549800</meta:creation-date>
    <dc:date>2026-06-29T11:33:55.000205900</dc:date>
    <meta:editing-duration>PT47M16S</meta:editing-duration>
    <meta:editing-cycles>3</meta:editing-cycles>
    <meta:generator>LibreOffice/26.2.4.2$Windows_X86_64 LibreOffice_project/0229ac93fcf0d7cbc6376066c6f35021cef002dc</meta:generator>
    <meta:document-statistic meta:table-count="0" meta:image-count="6" meta:object-count="0" meta:page-count="3" meta:paragraph-count="10" meta:word-count="80" meta:character-count="645" meta:non-whitespace-character-count="572"/>
  </office:meta>
</office:document-meta>
</file>