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inkercad 3D-Entwürfe: Einen Burgturm mit Zinnen erstellen</text:h>
      <text:h text:style-name="Heading_20_2" text:outline-level="2">Ziel</text:h>
      <text:p text:style-name="Text_20_body">In diesem Tutorial erstellst du einen einfachen Burgturm mit Zinnen. Dabei lernst du, wie man Grundkörper kombiniert und daraus ein kleines 3D-Modell baut.</text:p>
      <text:p text:style-name="Text_20_body">Du übst:</text:p>
      <text:list text:style-name="L1">
        <text:list-item>
          <text:p text:style-name="P1">Zylinder einfügen</text:p>
        </text:list-item>
        <text:list-item>
          <text:p text:style-name="P1">Größe ändern</text:p>
        </text:list-item>
        <text:list-item>
          <text:p text:style-name="P1">Quader als Zinnen verwenden</text:p>
        </text:list-item>
        <text:list-item>
          <text:p text:style-name="P1">Formen kopieren</text:p>
        </text:list-item>
        <text:list-item>
          <text:p text:style-name="P1">Formen ausrichten</text:p>
        </text:list-item>
        <text:list-item>
          <text:p text:style-name="P1">Formen gruppieren</text:p>
        </text:list-item>
        <text:list-item>
          <text:p text:style-name="P1">Bohrungen für Fenster oder Türen erstellen</text:p>
        </text:list-item>
      </text:list>
      <text:p text:style-name="Horizontal_20_Line"/>
      <text:h text:style-name="Heading_20_2" text:outline-level="2">1. Neuen 3D-Entwurf erstellen</text:h>
      <text:list text:style-name="L2">
        <text:list-item>
          <text:p text:style-name="P2">Öffne Tinkercad.</text:p>
        </text:list-item>
        <text:list-item>
          <text:p text:style-name="P2">Melde dich an.</text:p>
        </text:list-item>
        <text:list-item>
          <text:p text:style-name="P2">Öffne das <text:span text:style-name="Strong_20_Emphasis">Tinkercad-Dashboard</text:span>.</text:p>
        </text:list-item>
        <text:list-item>
          <text:p text:style-name="P2">Wähle <text:span text:style-name="Strong_20_Emphasis">3D-Entwürfe</text:span>.</text:p>
        </text:list-item>
        <text:list-item>
          <text:p text:style-name="P2">Klicke auf <text:span text:style-name="Strong_20_Emphasis">Neuen Entwurf erstellen</text:span>.</text:p>
        </text:list-item>
      </text:list>
      <text:p text:style-name="Text_20_body">Nun erscheint die Arbeitsfläche.</text:p>
      <text:p text:style-name="Horizontal_20_Line"/>
      <text:h text:style-name="Heading_20_2" text:outline-level="2">2. Grundkörper für den Turm einfügen</text:h>
      <text:list text:style-name="L3">
        <text:list-item>
          <text:p text:style-name="P3">Ziehe einen <text:span text:style-name="Strong_20_Emphasis">Zylinder</text:span> auf die Arbeitsfläche.</text:p>
        </text:list-item>
        <text:list-item>
          <text:p text:style-name="P3">Stelle die Größe ein:</text:p>
        </text:list-item>
      </text:list>
      <text:p text:style-name="Preformatted_20_Text"><text:span text:style-name="Source_20_Text">Durchmesser: 35 mm</text:span></text:p>
      <text:p text:style-name="P4"><text:span text:style-name="Source_20_Text">Höhe: 70 mm</text:span></text:p>
      <text:p text:style-name="Text_20_body">Der Zylinder bildet den Körper des Burgturms.</text:p>
      <text:p text:style-name="Horizontal_20_Line"/>
      <text:h text:style-name="Heading_20_2" text:outline-level="2"><text:soft-page-break/>3. Zylinder glätten</text:h>
      <text:p text:style-name="Text_20_body">Damit der Turm runder aussieht:</text:p>
      <text:list text:style-name="L4">
        <text:list-item>
          <text:p text:style-name="P5">Markiere den Zylinder.</text:p>
        </text:list-item>
        <text:list-item>
          <text:p text:style-name="P5">Erhöhe die Anzahl der Seiten.</text:p>
        </text:list-item>
      </text:list>
      <text:p text:style-name="Text_20_body">Empfehlung:</text:p>
      <text:p text:style-name="P4"><text:span text:style-name="Source_20_Text">Seiten: 32 oder 48</text:span></text:p>
      <text:p text:style-name="Text_20_body">Je mehr Seiten der Zylinder hat, desto runder wirkt der Turm.</text:p>
      <text:p text:style-name="Horizontal_20_Line"/>
      <text:h text:style-name="Heading_20_2" text:outline-level="2">4. Erste Zinne erstellen</text:h>
      <text:list text:style-name="L5">
        <text:list-item>
          <text:p text:style-name="P6">Ziehe einen <text:span text:style-name="Strong_20_Emphasis">Quader</text:span> auf die Arbeitsfläche.</text:p>
        </text:list-item>
        <text:list-item>
          <text:p text:style-name="P6">Stelle die Größe ein:</text:p>
        </text:list-item>
      </text:list>
      <text:p text:style-name="Preformatted_20_Text"><text:span text:style-name="Source_20_Text">Länge: 8 mm</text:span></text:p>
      <text:p text:style-name="Preformatted_20_Text"><text:span text:style-name="Source_20_Text">Breite: 8 mm</text:span></text:p>
      <text:p text:style-name="P4"><text:span text:style-name="Source_20_Text">Höhe: 12 mm</text:span></text:p>
      <text:list text:style-name="L6">
        <text:list-item>
          <text:p text:style-name="P7">Setze den Quader oben an den Rand des Turms.</text:p>
        </text:list-item>
      </text:list>
      <text:p text:style-name="Text_20_body">Dieser Quader ist die erste Zinne.</text:p>
      <text:p text:style-name="Horizontal_20_Line"/>
      <text:h text:style-name="Heading_20_2" text:outline-level="2">5. Weitere Zinnen kopieren</text:h>
      <text:list text:style-name="L7">
        <text:list-item>
          <text:p text:style-name="P8">Markiere die erste Zinne.</text:p>
        </text:list-item>
        <text:list-item>
          <text:p text:style-name="P8">Kopiere sie mit:</text:p>
        </text:list-item>
      </text:list>
      <text:p text:style-name="P4"><text:span text:style-name="Source_20_Text">Strg + C</text:span></text:p>
      <text:list text:style-name="L8">
        <text:list-item>
          <text:p text:style-name="P9">Füge sie wieder ein mit:</text:p>
        </text:list-item>
      </text:list>
      <text:p text:style-name="P4"><text:span text:style-name="Source_20_Text">Strg + V</text:span></text:p>
      <text:list text:style-name="L9">
        <text:list-item>
          <text:p text:style-name="P10">Verschiebe die neue Zinne an eine andere Stelle am oberen Rand.</text:p>
        </text:list-item>
      </text:list>
      <text:p text:style-name="Text_20_body">Wiederhole das, bis mehrere Zinnen rund um den Turm stehen.</text:p>
      <text:p text:style-name="Text_20_body">Für den Anfang reichen:</text:p>
      <text:p text:style-name="P4"><text:span text:style-name="Source_20_Text">6 bis 8 Zinnen</text:span></text:p>
      <text:p text:style-name="Horizontal_20_Line"/>
      <text:h text:style-name="Heading_20_2" text:outline-level="2">6. Zinnen gleichmäßig anordnen</text:h>
      <text:p text:style-name="Text_20_body">Ordne die Zinnen möglichst gleichmäßig um den oberen Rand des Turms an.</text:p>
      <text:p text:style-name="Text_20_body"><text:soft-page-break/>Achte darauf:</text:p>
      <text:list text:style-name="L10">
        <text:list-item>
          <text:p text:style-name="P11">Die Zinnen stehen oben auf dem Turm.</text:p>
        </text:list-item>
        <text:list-item>
          <text:p text:style-name="P11">Die Zinnen sitzen am Rand.</text:p>
        </text:list-item>
        <text:list-item>
          <text:p text:style-name="P11">Zwischen den Zinnen bleiben Lücken.</text:p>
        </text:list-item>
        <text:list-item>
          <text:p text:style-name="P11">Alle Zinnen sind gleich hoch.</text:p>
        </text:list-item>
      </text:list>
      <text:p text:style-name="Text_20_body">Tipp: Drehe die Arbeitsfläche regelmäßig, damit du den Turm von allen Seiten kontrollieren kannst.</text:p>
      <text:p text:style-name="Horizontal_20_Line"/>
      <text:h text:style-name="Heading_20_2" text:outline-level="2">7. Zinnen gruppieren</text:h>
      <text:p text:style-name="Text_20_body">Wenn alle Zinnen richtig stehen:</text:p>
      <text:list text:style-name="L11">
        <text:list-item>
          <text:p text:style-name="P12">Markiere den Turm und alle Zinnen.</text:p>
        </text:list-item>
        <text:list-item>
          <text:p text:style-name="P12">Klicke auf <text:span text:style-name="Strong_20_Emphasis">Gruppieren</text:span>.</text:p>
        </text:list-item>
      </text:list>
      <text:p text:style-name="Text_20_body">Jetzt wird aus dem Turm und den Zinnen ein gemeinsames Modell.</text:p>
      <text:p text:style-name="Horizontal_20_Line"/>
      <text:h text:style-name="Heading_20_2" text:outline-level="2">8. Türöffnung erstellen</text:h>
      <text:p text:style-name="Text_20_body">Eine Tür kann mit einer Bohrung ausgeschnitten werden.</text:p>
      <text:list text:style-name="L12">
        <text:list-item>
          <text:p text:style-name="P13">Ziehe einen <text:span text:style-name="Strong_20_Emphasis">Quader</text:span> auf die Arbeitsfläche.</text:p>
        </text:list-item>
        <text:list-item>
          <text:p text:style-name="P13">Stelle ihn auf <text:span text:style-name="Strong_20_Emphasis">Bohrung</text:span>.</text:p>
        </text:list-item>
        <text:list-item>
          <text:p text:style-name="P13">Stelle die Größe ein:</text:p>
        </text:list-item>
      </text:list>
      <text:p text:style-name="Preformatted_20_Text"><text:span text:style-name="Source_20_Text">Länge: 12 mm</text:span></text:p>
      <text:p text:style-name="Preformatted_20_Text"><text:span text:style-name="Source_20_Text">Breite: 10 mm</text:span></text:p>
      <text:p text:style-name="P4"><text:span text:style-name="Source_20_Text">Höhe: 25 mm</text:span></text:p>
      <text:list text:style-name="L13">
        <text:list-item>
          <text:p text:style-name="P14">Schiebe die Bohrung unten in den Turm.</text:p>
        </text:list-item>
        <text:list-item>
          <text:p text:style-name="P14">Markiere Turm und Bohrung.</text:p>
        </text:list-item>
        <text:list-item>
          <text:p text:style-name="P14">Klicke auf <text:span text:style-name="Strong_20_Emphasis">Gruppieren</text:span>.</text:p>
        </text:list-item>
      </text:list>
      <text:p text:style-name="Text_20_body">Nun wird die Türöffnung aus dem Turm ausgeschnitten.</text:p>
      <text:p text:style-name="Horizontal_20_Line"/>
      <text:h text:style-name="Heading_20_2" text:outline-level="2">9. Fenster erstellen</text:h>
      <text:p text:style-name="Text_20_body">Für kleine Fenster kannst du ebenfalls Bohrungen verwenden.</text:p>
      <text:list text:style-name="L14">
        <text:list-item>
          <text:p text:style-name="P15">Ziehe einen kleinen <text:span text:style-name="Strong_20_Emphasis">Quader</text:span> auf die Arbeitsfläche.</text:p>
        </text:list-item>
        <text:list-item>
          <text:p text:style-name="P15">Stelle ihn auf <text:span text:style-name="Strong_20_Emphasis">Bohrung</text:span>.</text:p>
        </text:list-item>
        <text:list-item>
          <text:p text:style-name="P15">Stelle die Größe ein:</text:p>
        </text:list-item>
      </text:list>
      <text:p text:style-name="Preformatted_20_Text"><text:soft-page-break/><text:span text:style-name="Source_20_Text">Länge: 6 mm</text:span></text:p>
      <text:p text:style-name="Preformatted_20_Text"><text:span text:style-name="Source_20_Text">Breite: 8 mm</text:span></text:p>
      <text:p text:style-name="P4"><text:span text:style-name="Source_20_Text">Höhe: 12 mm</text:span></text:p>
      <text:list text:style-name="L15">
        <text:list-item>
          <text:p text:style-name="P16">Schiebe die Bohrung in die Turmwand.</text:p>
        </text:list-item>
        <text:list-item>
          <text:p text:style-name="P16">Gruppiere die Bohrung mit dem Turm.</text:p>
        </text:list-item>
      </text:list>
      <text:p text:style-name="Text_20_body">Wiederhole das für weitere Fenster.</text:p>
      <text:p text:style-name="Horizontal_20_Line"/>
      <text:h text:style-name="Heading_20_2" text:outline-level="2">10. Optional: Rundbogentür</text:h>
      <text:p text:style-name="Text_20_body">Für eine Tür mit Rundbogen kannst du zwei Bohrungen kombinieren:</text:p>
      <text:list text:style-name="L16">
        <text:list-item>
          <text:p text:style-name="P17">Einen Quader als Bohrung für den unteren Teil.</text:p>
        </text:list-item>
        <text:list-item>
          <text:p text:style-name="P17">Einen Zylinder als Bohrung für den runden oberen Teil.</text:p>
        </text:list-item>
      </text:list>
      <text:p text:style-name="Text_20_body">Beide Bohrungen werden in den Turm geschoben und anschließend mit dem Turm gruppiert.</text:p>
      <text:p text:style-name="Horizontal_20_Line"/>
      <text:h text:style-name="Heading_20_2" text:outline-level="2">11. Ergebnis prüfen</text:h>
      <text:p text:style-name="Text_20_body">Kontrolliere dein Modell:</text:p>
      <text:list text:style-name="L17">
        <text:list-item>
          <text:p text:style-name="P18">Steht der Turm gerade auf der Arbeitsfläche?</text:p>
        </text:list-item>
        <text:list-item>
          <text:p text:style-name="P18">Sind die Zinnen gleichmäßig verteilt?</text:p>
        </text:list-item>
        <text:list-item>
          <text:p text:style-name="P18">Sind Tür und Fenster nicht zu groß?</text:p>
        </text:list-item>
        <text:list-item>
          <text:p text:style-name="P18">Haben alle Teile Kontakt miteinander?</text:p>
        </text:list-item>
        <text:list-item>
          <text:p text:style-name="P18">Ist das Modell stabil genug für den 3D-Druck?</text:p>
        </text:list-item>
      </text:list>
      <text:p text:style-name="Horizontal_20_Line"/>
      <text:h text:style-name="Heading_20_2" text:outline-level="2">12. Export für den 3D-Druck</text:h>
      <text:p text:style-name="Text_20_body">Wenn dein Burgturm fertig ist:</text:p>
      <text:list text:style-name="L18">
        <text:list-item>
          <text:p text:style-name="P19">Klicke auf <text:span text:style-name="Strong_20_Emphasis">Exportieren</text:span>.</text:p>
        </text:list-item>
        <text:list-item>
          <text:p text:style-name="P19">Wähle <text:span text:style-name="Strong_20_Emphasis">STL</text:span>.</text:p>
        </text:list-item>
        <text:list-item>
          <text:p text:style-name="P19">Speichere die Datei.</text:p>
        </text:list-item>
      </text:list>
      <text:p text:style-name="Text_20_body">Die STL-Datei kann später in einem Slicer für den 3D-Druck vorbereitet werden.</text:p>
      <text:p text:style-name="Horizontal_20_Line"/>
      <text:h text:style-name="Heading_20_2" text:outline-level="2">Zusatzaufgaben</text:h>
      <text:p text:style-name="Text_20_body">Erweitere deinen Burgturm:</text:p>
      <text:list text:style-name="L19">
        <text:list-item>
          <text:p text:style-name="P20">Baue ein kegelförmiges Dach.</text:p>
        </text:list-item>
        <text:list-item>
          <text:p text:style-name="P20"><text:soft-page-break/>Ergänze mehrere Fenster.</text:p>
        </text:list-item>
        <text:list-item>
          <text:p text:style-name="P20">Setze den Turm neben eine Burgmauer.</text:p>
        </text:list-item>
        <text:list-item>
          <text:p text:style-name="P20">Baue zwei Türme und verbinde sie mit einer Mauer.</text:p>
        </text:list-item>
        <text:list-item>
          <text:p text:style-name="P20">Füge ein Namensschild hinzu.</text:p>
        </text:list-item>
        <text:list-item>
          <text:p text:style-name="P20">Gestalte eine komplette Burganlag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7T22:23:19.420352900</meta:creation-date>
    <dc:date>2026-06-27T22:24:48.167425300</dc:date>
    <meta:editing-duration>PT1M29S</meta:editing-duration>
    <meta:editing-cycles>1</meta:editing-cycles>
    <meta:generator>LibreOffice/26.2.4.2$Windows_X86_64 LibreOffice_project/0229ac93fcf0d7cbc6376066c6f35021cef002dc</meta:generator>
    <meta:document-statistic meta:table-count="0" meta:image-count="0" meta:object-count="0" meta:page-count="5" meta:paragraph-count="111" meta:word-count="617" meta:character-count="3566" meta:non-whitespace-character-count="3116"/>
  </office:meta>
</office:document-meta>
</file>