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elle1" style:family="table">
      <style:table-properties style:width="6.726cm" table:align="left"/>
    </style:style>
    <style:style style:name="Tabelle1.A" style:family="table-column">
      <style:table-column-properties style:column-width="4.352cm"/>
    </style:style>
    <style:style style:name="Tabelle1.B" style:family="table-column">
      <style:table-column-properties style:column-width="2.374cm"/>
    </style:style>
    <style:style style:name="Tabel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able_20_Heading">
      <style:paragraph-properties fo:text-align="right" style:justify-single-word="false"/>
    </style:style>
    <style:style style:name="P4" style:family="paragraph" style:parent-style-name="Table_20_Contents">
      <style:paragraph-properties fo:text-align="right" style:justify-single-word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Bohrungen gleichmäßig drehen</text:h>
      <text:p text:style-name="Text_20_body">Die Zwischenräume zwischen den Zinnen werden mit Bohrungen ausgeschnitten. Damit die Bohrungen gleichmäßig um den Turm verteilt sind, muss der Drehwinkel berechnet werden.</text:p>
      <text:p text:style-name="Text_20_body">Ein Kreis hat <text:span text:style-name="Strong_20_Emphasis">360°</text:span>.</text:p>
      <text:p text:style-name="Text_20_body">Der Drehwinkel ergibt sich aus:</text:p>
      <text:p text:style-name="P1"><text:span text:style-name="Source_20_Text">Drehwinkel = 360° : Anzahl der Bohrungen</text:span></text:p>
      <text:h text:style-name="Heading_20_3" text:outline-level="3">Beispiel</text:h>
      <text:p text:style-name="Text_20_body">Es sollen <text:span text:style-name="Strong_20_Emphasis">8 Bohrungen</text:span> gleichmäßig um den Turm verteilt werden.</text:p>
      <text:p text:style-name="P1"><text:span text:style-name="Source_20_Text">360° : 8 = 45°</text:span></text:p>
      <text:p text:style-name="Text_20_body">Jede Bohrung wird also um <text:span text:style-name="Strong_20_Emphasis">45°</text:span> weitergedreht.</text:p>
      <text:h text:style-name="Heading_20_3" text:outline-level="3">Vorgehen in Tinkercad</text:h>
      <text:list text:style-name="L1">
        <text:list-item>
          <text:p text:style-name="P2">Erstelle eine rechteckige Bohrung für den ersten Zwischenraum.</text:p>
        </text:list-item>
        <text:list-item>
          <text:p text:style-name="P2">Richte die Bohrung so aus, dass sie in den oberen Rand des Turms schneidet.</text:p>
        </text:list-item>
        <text:list-item>
          <text:p text:style-name="P2">Kopiere die Bohrung.</text:p>
        </text:list-item>
        <text:list-item>
          <text:p text:style-name="P2">Drehe die Kopie um den berechneten Winkel.</text:p>
        </text:list-item>
        <text:list-item>
          <text:p text:style-name="P2">Wiederhole das, bis alle Bohrungen gleichmäßig verteilt sind.</text:p>
        </text:list-item>
        <text:list-item>
          <text:p text:style-name="P2">Markiere den Turm und alle Bohrungen.</text:p>
        </text:list-item>
        <text:list-item>
          <text:p text:style-name="P2">Klicke auf <text:span text:style-name="Strong_20_Emphasis">Gruppieren</text:span>.</text:p>
        </text:list-item>
      </text:list>
      <text:p text:style-name="Text_20_body">Beim Gruppieren werden die Bohrungen aus dem oberen Rand herausgeschnitten. Die stehenbleibenden Teile bilden die Zinnen.</text:p>
      <text:h text:style-name="Heading_20_3" text:outline-level="3">Beispiele für verschiedene Anzahlen</text:h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3">Anzahl der Bohrungen</text:p>
            </table:table-cell>
            <table:table-cell table:style-name="Tabelle1.A1" office:value-type="string">
              <text:p text:style-name="P3">Drehwinkel</text:p>
            </table:table-cell>
          </table:table-row>
        </table:table-header-rows>
        <table:table-row>
          <table:table-cell table:style-name="Tabelle1.A1" office:value-type="string">
            <text:p text:style-name="P4">4</text:p>
          </table:table-cell>
          <table:table-cell table:style-name="Tabelle1.A1" office:value-type="string">
            <text:p text:style-name="P4">90°</text:p>
          </table:table-cell>
        </table:table-row>
        <table:table-row>
          <table:table-cell table:style-name="Tabelle1.A1" office:value-type="string">
            <text:p text:style-name="P4">5</text:p>
          </table:table-cell>
          <table:table-cell table:style-name="Tabelle1.A1" office:value-type="string">
            <text:p text:style-name="P4">72°</text:p>
          </table:table-cell>
        </table:table-row>
        <table:table-row>
          <table:table-cell table:style-name="Tabelle1.A1" office:value-type="string">
            <text:p text:style-name="P4">6</text:p>
          </table:table-cell>
          <table:table-cell table:style-name="Tabelle1.A1" office:value-type="string">
            <text:p text:style-name="P4">60°</text:p>
          </table:table-cell>
        </table:table-row>
        <table:table-row>
          <table:table-cell table:style-name="Tabelle1.A1" office:value-type="string">
            <text:p text:style-name="P4">8</text:p>
          </table:table-cell>
          <table:table-cell table:style-name="Tabelle1.A1" office:value-type="string">
            <text:p text:style-name="P4">45°</text:p>
          </table:table-cell>
        </table:table-row>
        <table:table-row>
          <table:table-cell table:style-name="Tabelle1.A1" office:value-type="string">
            <text:p text:style-name="P4">10</text:p>
          </table:table-cell>
          <table:table-cell table:style-name="Tabelle1.A1" office:value-type="string">
            <text:p text:style-name="P4">36°</text:p>
          </table:table-cell>
        </table:table-row>
        <table:table-row>
          <table:table-cell table:style-name="Tabelle1.A1" office:value-type="string">
            <text:p text:style-name="P4">12</text:p>
          </table:table-cell>
          <table:table-cell table:style-name="Tabelle1.A1" office:value-type="string">
            <text:p text:style-name="P4">30°</text:p>
          </table:table-cell>
        </table:table-row>
      </table:table>
      <text:h text:style-name="Heading_20_3" text:outline-level="3">Merksatz</text:h>
      <text:p text:style-name="Text_20_body">Je mehr Bohrungen verwendet werden, desto kleiner wird der Drehwinkel.</text:p>
      <text:p text:style-name="P1"><text:span text:style-name="Source_20_Text">Drehwinkel = 360° : Anzahl der Bohrungen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7T22:34:10.023534300</meta:creation-date>
    <dc:date>2026-06-27T22:34:38.616956400</dc:date>
    <meta:editing-duration>PT28S</meta:editing-duration>
    <meta:editing-cycles>1</meta:editing-cycles>
    <meta:generator>LibreOffice/26.2.4.2$Windows_X86_64 LibreOffice_project/0229ac93fcf0d7cbc6376066c6f35021cef002dc</meta:generator>
    <meta:document-statistic meta:table-count="1" meta:image-count="0" meta:object-count="0" meta:page-count="1" meta:paragraph-count="36" meta:word-count="178" meta:character-count="1101" meta:non-whitespace-character-count="966"/>
  </office:meta>
</office:document-meta>
</file>