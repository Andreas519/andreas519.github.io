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5f4ef"/>
    </style:style>
    <style:style style:name="P2" style:family="paragraph" style:parent-style-name="Heading_20_2">
      <style:paragraph-properties fo:margin-top="0cm" fo:margin-bottom="0.499cm" style:contextual-spacing="false"/>
      <style:text-properties style:use-window-font-color="true" loext:opacity="0%" style:font-name="Open Sans" fo:font-size="10pt" officeooo:paragraph-rsid="0005f4ef" style:font-name-asian="AR PL SungtiL GB" style:font-size-asian="10pt" style:font-name-complex="Lohit Devanagari" style:font-size-complex="12pt"/>
    </style:style>
    <style:style style:name="P3" style:family="paragraph" style:parent-style-name="Text_20_body">
      <style:text-properties officeooo:paragraph-rsid="0005f4ef"/>
    </style:style>
    <style:style style:name="P4" style:family="paragraph" style:parent-style-name="Text_20_body" style:list-style-name="L1">
      <style:text-properties officeooo:paragraph-rsid="0005f4ef"/>
    </style:style>
    <style:style style:name="P5" style:family="paragraph" style:parent-style-name="Horizontal_20_Line">
      <style:paragraph-properties fo:margin-top="0cm" fo:margin-bottom="0cm" style:contextual-spacing="false"/>
      <style:text-properties fo:font-size="10pt" officeooo:paragraph-rsid="0005f4ef" style:font-size-asian="10pt" style:font-size-complex="12pt"/>
    </style:style>
    <style:style style:name="P6" style:family="paragraph" style:parent-style-name="Text_20_body" style:list-style-name="L2">
      <style:text-properties officeooo:paragraph-rsid="0005f4ef"/>
    </style:style>
    <style:style style:name="P7" style:family="paragraph" style:parent-style-name="Text_20_body" style:list-style-name="L3">
      <style:text-properties officeooo:paragraph-rsid="0005f4ef"/>
    </style:style>
    <style:style style:name="P8" style:family="paragraph" style:parent-style-name="Preformatted_20_Text">
      <style:text-properties style:font-name="Open Sans" officeooo:paragraph-rsid="0005f4ef" style:font-name-asian="AR PL SungtiL GB" style:font-name-complex="Lohit Devanagari" style:font-size-complex="12pt"/>
    </style:style>
    <style:style style:name="P9" style:family="paragraph" style:parent-style-name="Preformatted_20_Text">
      <style:paragraph-properties fo:margin-top="0cm" fo:margin-bottom="0.499cm" style:contextual-spacing="false"/>
      <style:text-properties style:font-name="Open Sans" officeooo:paragraph-rsid="0005f4ef" style:font-name-asian="AR PL SungtiL GB" style:font-name-complex="Lohit Devanagari" style:font-size-complex="12pt"/>
    </style:style>
    <style:style style:name="P10" style:family="paragraph" style:parent-style-name="Text_20_body" style:list-style-name="L4">
      <style:text-properties officeooo:paragraph-rsid="0005f4ef"/>
    </style:style>
    <style:style style:name="P11" style:family="paragraph" style:parent-style-name="Text_20_body" style:list-style-name="L5">
      <style:text-properties officeooo:paragraph-rsid="0005f4ef"/>
    </style:style>
    <style:style style:name="P12" style:family="paragraph" style:parent-style-name="Text_20_body" style:list-style-name="L6">
      <style:text-properties officeooo:paragraph-rsid="0005f4ef"/>
    </style:style>
    <style:style style:name="P13" style:family="paragraph" style:parent-style-name="Text_20_body" style:list-style-name="L7">
      <style:text-properties officeooo:paragraph-rsid="0005f4ef"/>
    </style:style>
    <style:style style:name="P14" style:family="paragraph" style:parent-style-name="Text_20_body" style:list-style-name="L8">
      <style:text-properties officeooo:paragraph-rsid="0005f4ef"/>
    </style:style>
    <style:style style:name="P15" style:family="paragraph" style:parent-style-name="Text_20_body" style:list-style-name="L9">
      <style:text-properties officeooo:paragraph-rsid="0005f4ef"/>
    </style:style>
    <style:style style:name="P16" style:family="paragraph" style:parent-style-name="Text_20_body" style:list-style-name="L10">
      <style:text-properties officeooo:paragraph-rsid="0005f4ef"/>
    </style:style>
    <style:style style:name="P17" style:family="paragraph" style:parent-style-name="Text_20_body" style:list-style-name="L11">
      <style:text-properties officeooo:paragraph-rsid="0005f4ef"/>
    </style:style>
    <style:style style:name="P18" style:family="paragraph" style:parent-style-name="Text_20_body" style:list-style-name="L12">
      <style:text-properties officeooo:paragraph-rsid="0005f4ef"/>
    </style:style>
    <style:style style:name="P19" style:family="paragraph" style:parent-style-name="Text_20_body" style:list-style-name="L13">
      <style:text-properties officeooo:paragraph-rsid="0005f4ef"/>
    </style:style>
    <style:style style:name="P20" style:family="paragraph" style:parent-style-name="Standard">
      <style:text-properties officeooo:paragraph-rsid="0005f4ef"/>
    </style:style>
    <style:style style:name="T1" style:family="text">
      <style:text-properties style:use-window-font-color="true" loext:opacity="0%" style:font-name="Open Sans" fo:font-size="10pt" style:font-name-asian="AR PL SungtiL GB" style:font-size-asian="10pt" style:font-name-complex="Lohit Devanagari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Internet_20_link"><text:span text:style-name="T1">Tinkercad 3D-Entwürfe: Einen einfachen Schlüsselanhänger erstellen</text:span></text:span></text:h>
      <text:h text:style-name="P2" text:outline-level="2">Ziel</text:h>
      <text:p text:style-name="P3">In diesem Tutorial erstellst du einen einfachen Schlüsselanhänger mit deinem Namen. Dabei lernst du wichtige Grundfunktionen von Tinkercad kennen.</text:p>
      <text:p text:style-name="P3">Du übst:</text:p>
      <text:list text:style-name="L1">
        <text:list-item>
          <text:p text:style-name="P4">Grundkörper einfügen</text:p>
        </text:list-item>
        <text:list-item>
          <text:p text:style-name="P4">Größe ändern</text:p>
        </text:list-item>
        <text:list-item>
          <text:p text:style-name="P4">Formen verschieben</text:p>
        </text:list-item>
        <text:list-item>
          <text:p text:style-name="P4">Text einfügen</text:p>
        </text:list-item>
        <text:list-item>
          <text:p text:style-name="P4">Bohrung erstellen</text:p>
        </text:list-item>
        <text:list-item>
          <text:p text:style-name="P4">Formen gruppieren</text:p>
        </text:list-item>
      </text:list>
      <text:p text:style-name="P5"/>
      <text:h text:style-name="P2" text:outline-level="2">1. Neuen 3D-Entwurf erstellen</text:h>
      <text:list text:style-name="L2">
        <text:list-item>
          <text:p text:style-name="P6">Öffne Tinkercad.</text:p>
        </text:list-item>
        <text:list-item>
          <text:p text:style-name="P6">Melde dich an.</text:p>
        </text:list-item>
        <text:list-item>
          <text:p text:style-name="P6">Gehe zum Tinkercad-Dashboard.</text:p>
        </text:list-item>
        <text:list-item>
          <text:p text:style-name="P6">Wähle <text:span text:style-name="Strong_20_Emphasis">3D-Entwürfe</text:span>.</text:p>
        </text:list-item>
        <text:list-item>
          <text:p text:style-name="P6">Klicke auf <text:span text:style-name="Strong_20_Emphasis">Neuen Entwurf erstellen</text:span>.</text:p>
        </text:list-item>
      </text:list>
      <text:p text:style-name="P3">Nun erscheint die Arbeitsfläche.</text:p>
      <text:p text:style-name="P5"/>
      <text:h text:style-name="P2" text:outline-level="2">2. Grundkörper einfügen</text:h>
      <text:list text:style-name="L3">
        <text:list-item>
          <text:p text:style-name="P7">Ziehe einen <text:span text:style-name="Strong_20_Emphasis">Quader</text:span> auf die Arbeitsfläche.</text:p>
        </text:list-item>
        <text:list-item>
          <text:p text:style-name="P7">Stelle die Größe ein:</text:p>
        </text:list-item>
      </text:list>
      <text:p text:style-name="P8"><text:span text:style-name="Source_20_Text">Länge: 70 mm</text:span></text:p>
      <text:p text:style-name="P8"><text:span text:style-name="Source_20_Text">Breite: 25 mm</text:span></text:p>
      <text:p text:style-name="P9"><text:span text:style-name="Source_20_Text">Höhe: 4 mm</text:span></text:p>
      <text:p text:style-name="P3">Dieser Quader bildet die Grundplatte des Schlüsselanhängers.</text:p>
      <text:p text:style-name="P5"/>
      <text:h text:style-name="P2" text:outline-level="2">3. Ecken abrunden</text:h>
      <text:list text:style-name="L4">
        <text:list-item>
          <text:p text:style-name="P10">Wähle statt eines normalen Quaders den Grundkörper <text:span text:style-name="Strong_20_Emphasis">Box</text:span> oder <text:span text:style-name="Strong_20_Emphasis">abgerundeter Quader</text:span>, falls vorhanden.</text:p>
        </text:list-item>
        <text:list-item>
          <text:p text:style-name="P10">Stelle die Rundung so ein, dass die Ecken leicht abgerundet sind.</text:p>
        </text:list-item>
      </text:list>
      <text:p text:style-name="P3">Alternativ kannst du auch mit Zylindern und Gruppieren arbeiten. Für den Anfang reicht ein einfacher Quader.</text:p>
      <text:p text:style-name="P5"><text:soft-page-break/></text:p>
      <text:h text:style-name="P2" text:outline-level="2">4. Text einfügen</text:h>
      <text:list text:style-name="L5">
        <text:list-item>
          <text:p text:style-name="P11">Ziehe den Grundkörper <text:span text:style-name="Strong_20_Emphasis">Text</text:span> auf die Arbeitsfläche.</text:p>
        </text:list-item>
        <text:list-item>
          <text:p text:style-name="P11">Schreibe deinen Namen hinein.</text:p>
        </text:list-item>
        <text:list-item>
          <text:p text:style-name="P11">Stelle die Texthöhe ein:</text:p>
        </text:list-item>
      </text:list>
      <text:p text:style-name="P9"><text:span text:style-name="Source_20_Text">Höhe: 1 mm bis 2 mm</text:span></text:p>
      <text:list text:style-name="L6">
        <text:list-item>
          <text:p text:style-name="P12">Lege den Text auf die Grundplatte.</text:p>
        </text:list-item>
        <text:list-item>
          <text:p text:style-name="P12">Passe die Größe so an, dass der Text gut auf den Schlüsselanhänger passt.</text:p>
        </text:list-item>
      </text:list>
      <text:p text:style-name="P5"/>
      <text:h text:style-name="P2" text:outline-level="2">5. Bohrung für den Schlüsselring erstellen</text:h>
      <text:list text:style-name="L7">
        <text:list-item>
          <text:p text:style-name="P13">Ziehe einen <text:span text:style-name="Strong_20_Emphasis">Zylinder</text:span> auf die Arbeitsfläche.</text:p>
        </text:list-item>
        <text:list-item>
          <text:p text:style-name="P13">Stelle den Zylinder auf <text:span text:style-name="Strong_20_Emphasis">Bohrung</text:span> um.</text:p>
        </text:list-item>
        <text:list-item>
          <text:p text:style-name="P13">Stelle die Größe ein:</text:p>
        </text:list-item>
      </text:list>
      <text:p text:style-name="P8"><text:span text:style-name="Source_20_Text">Durchmesser: 6 mm</text:span></text:p>
      <text:p text:style-name="P9"><text:span text:style-name="Source_20_Text">Höhe: 10 mm</text:span></text:p>
      <text:list text:style-name="L8">
        <text:list-item>
          <text:p text:style-name="P14">Setze die Bohrung an ein Ende der Grundplatte.</text:p>
        </text:list-item>
        <text:list-item>
          <text:p text:style-name="P14">Achte darauf, dass die Bohrung vollständig durch die Grundplatte reicht.</text:p>
        </text:list-item>
      </text:list>
      <text:p text:style-name="P5"/>
      <text:h text:style-name="P2" text:outline-level="2">6. Formen gruppieren</text:h>
      <text:list text:style-name="L9">
        <text:list-item>
          <text:p text:style-name="P15">Markiere die Grundplatte und die Bohrung.</text:p>
        </text:list-item>
        <text:list-item>
          <text:p text:style-name="P15">Klicke auf <text:span text:style-name="Strong_20_Emphasis">Gruppieren</text:span>.</text:p>
        </text:list-item>
      </text:list>
      <text:p text:style-name="P3">Jetzt wird das Loch aus der Grundplatte ausgeschnitten.</text:p>
      <text:p text:style-name="P3">Wenn der Text fest mit dem Schlüsselanhänger verbunden sein soll:</text:p>
      <text:list text:style-name="L10">
        <text:list-item>
          <text:p text:style-name="P16">Markiere Grundplatte und Text.</text:p>
        </text:list-item>
        <text:list-item>
          <text:p text:style-name="P16">Klicke erneut auf <text:span text:style-name="Strong_20_Emphasis">Gruppieren</text:span>.</text:p>
        </text:list-item>
      </text:list>
      <text:p text:style-name="P5"/>
      <text:h text:style-name="P2" text:outline-level="2">7. Ergebnis prüfen</text:h>
      <text:p text:style-name="P3">Kontrolliere dein Modell:</text:p>
      <text:list text:style-name="L11">
        <text:list-item>
          <text:p text:style-name="P17">Ist der Text gut lesbar?</text:p>
        </text:list-item>
        <text:list-item>
          <text:p text:style-name="P17">Ist die Bohrung groß genug?</text:p>
        </text:list-item>
        <text:list-item>
          <text:p text:style-name="P17">Liegt der Text richtig auf der Grundplatte?</text:p>
        </text:list-item>
        <text:list-item>
          <text:p text:style-name="P17">Ist der Schlüsselanhänger nicht zu dünn?</text:p>
        </text:list-item>
      </text:list>
      <text:p text:style-name="P3">Eine Höhe von etwa <text:span text:style-name="Strong_20_Emphasis">4 mm</text:span> ist für einen ersten Schlüsselanhänger gut geeignet.</text:p>
      <text:p text:style-name="P5"><text:soft-page-break/></text:p>
      <text:h text:style-name="P2" text:outline-level="2">8. Export für den 3D-Druck</text:h>
      <text:p text:style-name="P3">Wenn dein Modell fertig ist:</text:p>
      <text:list text:style-name="L12">
        <text:list-item>
          <text:p text:style-name="P18">Klicke auf <text:span text:style-name="Strong_20_Emphasis">Exportieren</text:span>.</text:p>
        </text:list-item>
        <text:list-item>
          <text:p text:style-name="P18">Wähle <text:span text:style-name="Strong_20_Emphasis">STL</text:span>.</text:p>
        </text:list-item>
        <text:list-item>
          <text:p text:style-name="P18">Speichere die Datei.</text:p>
        </text:list-item>
      </text:list>
      <text:p text:style-name="P3">Die STL-Datei kann später in einem Slicer für den 3D-Druck vorbereitet werden.</text:p>
      <text:p text:style-name="P5"/>
      <text:h text:style-name="P2" text:outline-level="2">Zusatzaufgabe</text:h>
      <text:p text:style-name="P3">Gestalte deinen Schlüsselanhänger weiter:</text:p>
      <text:list text:style-name="L13">
        <text:list-item>
          <text:p text:style-name="P19">andere Form</text:p>
        </text:list-item>
        <text:list-item>
          <text:p text:style-name="P19">abgerundete Ecken</text:p>
        </text:list-item>
        <text:list-item>
          <text:p text:style-name="P19">Symbol oder Logo</text:p>
        </text:list-item>
        <text:list-item>
          <text:p text:style-name="P19">zweite Farbe</text:p>
        </text:list-item>
        <text:list-item>
          <text:p text:style-name="P19">eingeprägter statt erhabener Text</text:p>
        </text:list-item>
      </text:list>
      <text:p text:style-name="P20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7T22:25:03.432786000</meta:creation-date>
    <dc:date>2026-06-27T22:27:04.569291500</dc:date>
    <meta:editing-duration>PT2M1S</meta:editing-duration>
    <meta:editing-cycles>1</meta:editing-cycles>
    <meta:document-statistic meta:table-count="0" meta:image-count="0" meta:object-count="0" meta:page-count="3" meta:paragraph-count="70" meta:word-count="393" meta:character-count="2402" meta:non-whitespace-character-count="2120"/>
    <meta:generator>LibreOffice/26.2.4.2$Windows_X86_64 LibreOffice_project/0229ac93fcf0d7cbc6376066c6f35021cef002dc</meta:generator>
  </office:meta>
</office:document-meta>
</file>