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Zinnen mit Bohrungen erstellen</text:h>
      <text:p text:style-name="Text_20_body">Die Zinnen entstehen nicht dadurch, dass einzelne Quader oben auf den Turm gesetzt werden. Stattdessen wird zuerst ein geschlossener oberer Rand erstellt. Anschließend werden die Zwischenräume mit Bohrungen ausgeschnitten.</text:p>
      <text:h text:style-name="Heading_20_3" text:outline-level="3">Vorgehen</text:h>
      <text:list text:style-name="L1">
        <text:list-item>
          <text:p text:style-name="P1">Erstelle zuerst den runden Turmkörper mit einem <text:span text:style-name="Strong_20_Emphasis">Zylinder</text:span>.</text:p>
        </text:list-item>
        <text:list-item>
          <text:p text:style-name="P1">Setze oben auf den Turm einen etwas höheren Rand. Dieser Rand bildet später die Zinnen.</text:p>
        </text:list-item>
        <text:list-item>
          <text:p text:style-name="P1">Füge einen <text:span text:style-name="Strong_20_Emphasis">Quader</text:span> ein.</text:p>
        </text:list-item>
        <text:list-item>
          <text:p text:style-name="P1">Stelle diesen Quader von <text:span text:style-name="Strong_20_Emphasis">Volumenkörper</text:span> auf <text:span text:style-name="Strong_20_Emphasis">Bohrung</text:span> um.</text:p>
        </text:list-item>
        <text:list-item>
          <text:p text:style-name="P1">Schiebe die Bohrung so in den oberen Rand, dass sie einen Zwischenraum zwischen zwei Zinnen ausschneidet.</text:p>
        </text:list-item>
        <text:list-item>
          <text:p text:style-name="P1">Kopiere die Bohrung mehrfach und verteile die Bohrungen gleichmäßig um den oberen Rand des Turms.</text:p>
        </text:list-item>
        <text:list-item>
          <text:p text:style-name="P1">Markiere den Turm und alle Bohrungen.</text:p>
        </text:list-item>
        <text:list-item>
          <text:p text:style-name="P1">Klicke auf <text:span text:style-name="Strong_20_Emphasis">Gruppieren</text:span>.</text:p>
        </text:list-item>
      </text:list>
      <text:p text:style-name="Text_20_body">Beim Gruppieren werden die Bohrungen aus dem oberen Rand herausgeschnitten. Übrig bleiben die Zinnen.</text:p>
      <text:h text:style-name="Heading_20_3" text:outline-level="3">Ergebnis</text:h>
      <text:p text:style-name="Text_20_body">Aus einem zunächst geschlossenen Turmrand wird durch das Ausschneiden mehrerer rechteckiger Zwischenräume ein Zinnenkranz.</text:p>
      <text:h text:style-name="Heading_20_3" text:outline-level="3">Merksatz</text:h>
      <text:p text:style-name="Text_20_body">Eine Bohrung fügt kein Material hinzu, sondern entfernt beim Gruppieren Material aus einem Volumenkörp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7T22:30:59.666309000</meta:creation-date>
    <dc:date>2026-06-27T22:31:32.209163800</dc:date>
    <meta:editing-duration>PT32S</meta:editing-duration>
    <meta:editing-cycles>1</meta:editing-cycles>
    <meta:document-statistic meta:table-count="0" meta:image-count="0" meta:object-count="0" meta:page-count="1" meta:paragraph-count="16" meta:word-count="161" meta:character-count="1101" meta:non-whitespace-character-count="964"/>
    <meta:generator>LibreOffice/26.2.4.2$Windows_X86_64 LibreOffice_project/0229ac93fcf0d7cbc6376066c6f35021cef002dc</meta:generator>
  </office:meta>
</office:document-meta>
</file>