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inkercad 3D-Entwürfe: Eine Burgmauer mit Zinnen erstellen</text:h>
      <text:h text:style-name="Heading_20_2" text:outline-level="2">Ziel</text:h>
      <text:p text:style-name="Text_20_body">In diesem Tutorial erstellst du eine einfache Burgmauer mit Zinnen. Dabei lernst du wichtige Grundfunktionen von Tinkercad kennen.</text:p>
      <text:p text:style-name="Text_20_body">Du übst:</text:p>
      <text:list text:style-name="L1">
        <text:list-item>
          <text:p text:style-name="P1">Grundkörper einfügen</text:p>
        </text:list-item>
        <text:list-item>
          <text:p text:style-name="P1">Größe ändern</text:p>
        </text:list-item>
        <text:list-item>
          <text:p text:style-name="P1">Formen verschieben</text:p>
        </text:list-item>
        <text:list-item>
          <text:p text:style-name="P1">Formen kopieren</text:p>
        </text:list-item>
        <text:list-item>
          <text:p text:style-name="P1">Formen ausrichten</text:p>
        </text:list-item>
        <text:list-item>
          <text:p text:style-name="P1">Formen gruppieren</text:p>
        </text:list-item>
        <text:list-item>
          <text:p text:style-name="P1">einfache Bauteile zusammensetzen</text:p>
        </text:list-item>
      </text:list>
      <text:p text:style-name="Horizontal_20_Line"/>
      <text:h text:style-name="Heading_20_2" text:outline-level="2">1. Neuen 3D-Entwurf erstellen</text:h>
      <text:list text:style-name="L2">
        <text:list-item>
          <text:p text:style-name="P2">Öffne Tinkercad.</text:p>
        </text:list-item>
        <text:list-item>
          <text:p text:style-name="P2">Melde dich an.</text:p>
        </text:list-item>
        <text:list-item>
          <text:p text:style-name="P2">Öffne das <text:span text:style-name="Strong_20_Emphasis">Tinkercad-Dashboard</text:span>.</text:p>
        </text:list-item>
        <text:list-item>
          <text:p text:style-name="P2">Wähle <text:span text:style-name="Strong_20_Emphasis">3D-Entwürfe</text:span>.</text:p>
        </text:list-item>
        <text:list-item>
          <text:p text:style-name="P2">Klicke auf <text:span text:style-name="Strong_20_Emphasis">Neuen Entwurf erstellen</text:span>.</text:p>
        </text:list-item>
      </text:list>
      <text:p text:style-name="Text_20_body">Nun erscheint die Arbeitsfläche.</text:p>
      <text:p text:style-name="Horizontal_20_Line"/>
      <text:h text:style-name="Heading_20_2" text:outline-level="2">2. Grundkörper für die Burgmauer einfügen</text:h>
      <text:list text:style-name="L3">
        <text:list-item>
          <text:p text:style-name="P3">Ziehe einen <text:span text:style-name="Strong_20_Emphasis">Quader</text:span> auf die Arbeitsfläche.</text:p>
        </text:list-item>
        <text:list-item>
          <text:p text:style-name="P3">Stelle die Größe ein:</text:p>
        </text:list-item>
      </text:list>
      <text:p text:style-name="Preformatted_20_Text"><text:span text:style-name="Source_20_Text">Länge: 100 mm</text:span></text:p>
      <text:p text:style-name="Preformatted_20_Text"><text:span text:style-name="Source_20_Text">Breite: 12 mm</text:span></text:p>
      <text:p text:style-name="P4"><text:span text:style-name="Source_20_Text">Höhe: 35 mm</text:span></text:p>
      <text:p text:style-name="Text_20_body">Dieser Quader bildet die eigentliche Burgmauer.</text:p>
      <text:p text:style-name="Horizontal_20_Line"/>
      <text:h text:style-name="Heading_20_2" text:outline-level="2"><text:soft-page-break/>3. Erste Zinne erstellen</text:h>
      <text:list text:style-name="L4">
        <text:list-item>
          <text:p text:style-name="P5">Ziehe einen weiteren <text:span text:style-name="Strong_20_Emphasis">Quader</text:span> auf die Arbeitsfläche.</text:p>
        </text:list-item>
        <text:list-item>
          <text:p text:style-name="P5">Stelle die Größe ein:</text:p>
        </text:list-item>
      </text:list>
      <text:p text:style-name="Preformatted_20_Text"><text:span text:style-name="Source_20_Text">Länge: 10 mm</text:span></text:p>
      <text:p text:style-name="Preformatted_20_Text"><text:span text:style-name="Source_20_Text">Breite: 12 mm</text:span></text:p>
      <text:p text:style-name="P4"><text:span text:style-name="Source_20_Text">Höhe: 15 mm</text:span></text:p>
      <text:list text:style-name="L5">
        <text:list-item>
          <text:p text:style-name="P6">Setze diesen Quader oben auf die Mauer.</text:p>
        </text:list-item>
      </text:list>
      <text:p text:style-name="Text_20_body">Die Zinne soll auf der Mauer stehen und nach oben herausragen.</text:p>
      <text:p text:style-name="Horizontal_20_Line"/>
      <text:h text:style-name="Heading_20_2" text:outline-level="2">4. Zinnen kopieren</text:h>
      <text:list text:style-name="L6">
        <text:list-item>
          <text:p text:style-name="P7">Markiere die erste Zinne.</text:p>
        </text:list-item>
        <text:list-item>
          <text:p text:style-name="P7">Kopiere sie mit:</text:p>
        </text:list-item>
      </text:list>
      <text:p text:style-name="P4"><text:span text:style-name="Source_20_Text">Strg + C</text:span></text:p>
      <text:list text:style-name="L7">
        <text:list-item>
          <text:p text:style-name="P8">Füge sie wieder ein mit:</text:p>
        </text:list-item>
      </text:list>
      <text:p text:style-name="P4"><text:span text:style-name="Source_20_Text">Strg + V</text:span></text:p>
      <text:list text:style-name="L8">
        <text:list-item>
          <text:p text:style-name="P9">Verschiebe die neue Zinne etwas zur Seite.</text:p>
        </text:list-item>
      </text:list>
      <text:p text:style-name="Text_20_body">Wiederhole diesen Vorgang, bis mehrere Zinnen auf der Mauer stehen.</text:p>
      <text:p text:style-name="Text_20_body">Eine mögliche Anordnung:</text:p>
      <text:p text:style-name="P4"><text:span text:style-name="Source_20_Text">Zinne - Lücke - Zinne - Lücke - Zinne - Lücke - Zinne</text:span></text:p>
      <text:p text:style-name="Horizontal_20_Line"/>
      <text:h text:style-name="Heading_20_2" text:outline-level="2">5. Zinnen gleichmäßig anordnen</text:h>
      <text:p text:style-name="Text_20_body">Ordne die Zinnen oben auf der Mauer gleichmäßig an.</text:p>
      <text:p text:style-name="Text_20_body">Für den Anfang reichen zum Beispiel <text:span text:style-name="Strong_20_Emphasis">5 Zinnen</text:span>.</text:p>
      <text:p text:style-name="Text_20_body">Beispielwerte:</text:p>
      <text:p text:style-name="Preformatted_20_Text"><text:span text:style-name="Source_20_Text">Zinne 1: links außen</text:span></text:p>
      <text:p text:style-name="Preformatted_20_Text"><text:span text:style-name="Source_20_Text">Zinne 2: weiter rechts</text:span></text:p>
      <text:p text:style-name="Preformatted_20_Text"><text:span text:style-name="Source_20_Text">Zinne 3: Mitte</text:span></text:p>
      <text:p text:style-name="Preformatted_20_Text"><text:span text:style-name="Source_20_Text">Zinne 4: weiter rechts</text:span></text:p>
      <text:p text:style-name="P4"><text:span text:style-name="Source_20_Text">Zinne 5: rechts außen</text:span></text:p>
      <text:p text:style-name="Text_20_body">Achte darauf:</text:p>
      <text:list text:style-name="L9">
        <text:list-item>
          <text:p text:style-name="P10">Alle Zinnen sollen gleich hoch sein.</text:p>
        </text:list-item>
        <text:list-item>
          <text:p text:style-name="P10">Alle Zinnen sollen auf der Mauer stehen.</text:p>
        </text:list-item>
        <text:list-item>
          <text:p text:style-name="P10">Zwischen den Zinnen sollen gleichmäßige Lücken bleiben.</text:p>
        </text:list-item>
      </text:list>
      <text:p text:style-name="Horizontal_20_Line"><text:soft-page-break/></text:p>
      <text:h text:style-name="Heading_20_2" text:outline-level="2">6. Formen ausrichten</text:h>
      <text:p text:style-name="Text_20_body">Wenn die Zinnen ungenau stehen:</text:p>
      <text:list text:style-name="L10">
        <text:list-item>
          <text:p text:style-name="P11">Markiere die Mauer und alle Zinnen.</text:p>
        </text:list-item>
        <text:list-item>
          <text:p text:style-name="P11">Klicke auf <text:span text:style-name="Strong_20_Emphasis">Ausrichten</text:span>.</text:p>
        </text:list-item>
        <text:list-item>
          <text:p text:style-name="P11">Richte die Zinnen so aus, dass sie mittig auf der Mauer sitzen.</text:p>
        </text:list-item>
      </text:list>
      <text:p text:style-name="Text_20_body">Die Zinnen sollen nicht vor oder hinter der Mauer verrutschen.</text:p>
      <text:p text:style-name="Horizontal_20_Line"/>
      <text:h text:style-name="Heading_20_2" text:outline-level="2">7. Formen gruppieren</text:h>
      <text:p text:style-name="Text_20_body">Wenn alles richtig steht:</text:p>
      <text:list text:style-name="L11">
        <text:list-item>
          <text:p text:style-name="P12">Markiere die Mauer und alle Zinnen.</text:p>
        </text:list-item>
        <text:list-item>
          <text:p text:style-name="P12">Klicke auf <text:span text:style-name="Strong_20_Emphasis">Gruppieren</text:span>.</text:p>
        </text:list-item>
      </text:list>
      <text:p text:style-name="Text_20_body">Nun wird aus den einzelnen Quadern ein gemeinsames Modell.</text:p>
      <text:p text:style-name="Horizontal_20_Line"/>
      <text:h text:style-name="Heading_20_2" text:outline-level="2">8. Optional: Toröffnung einfügen</text:h>
      <text:p text:style-name="Text_20_body">Du kannst eine Toröffnung in die Burgmauer schneiden.</text:p>
      <text:list text:style-name="L12">
        <text:list-item>
          <text:p text:style-name="P13">Ziehe einen <text:span text:style-name="Strong_20_Emphasis">Quader</text:span> auf die Arbeitsfläche.</text:p>
        </text:list-item>
        <text:list-item>
          <text:p text:style-name="P13">Stelle ihn auf <text:span text:style-name="Strong_20_Emphasis">Bohrung</text:span>.</text:p>
        </text:list-item>
        <text:list-item>
          <text:p text:style-name="P13">Stelle die Größe ein:</text:p>
        </text:list-item>
      </text:list>
      <text:p text:style-name="Preformatted_20_Text"><text:span text:style-name="Source_20_Text">Länge: 20 mm</text:span></text:p>
      <text:p text:style-name="Preformatted_20_Text"><text:span text:style-name="Source_20_Text">Breite: 20 mm</text:span></text:p>
      <text:p text:style-name="P4"><text:span text:style-name="Source_20_Text">Höhe: 25 mm</text:span></text:p>
      <text:list text:style-name="L13">
        <text:list-item>
          <text:p text:style-name="P14">Schiebe die Bohrung in die Mitte der Mauer.</text:p>
        </text:list-item>
        <text:list-item>
          <text:p text:style-name="P14">Markiere Mauer und Bohrung.</text:p>
        </text:list-item>
        <text:list-item>
          <text:p text:style-name="P14">Klicke auf <text:span text:style-name="Strong_20_Emphasis">Gruppieren</text:span>.</text:p>
        </text:list-item>
      </text:list>
      <text:p text:style-name="Text_20_body">Jetzt wird die Toröffnung aus der Mauer ausgeschnitten.</text:p>
      <text:p text:style-name="Horizontal_20_Line"/>
      <text:h text:style-name="Heading_20_2" text:outline-level="2">9. Optional: Rundes Tor</text:h>
      <text:p text:style-name="Text_20_body">Für ein rundes Burgtor kannst du eine rechteckige Bohrung und eine zylindrische Bohrung kombinieren.</text:p>
      <text:list text:style-name="L14">
        <text:list-item>
          <text:p text:style-name="P15">Erstelle zuerst eine rechteckige Bohrung für den unteren Teil des Tores.</text:p>
        </text:list-item>
        <text:list-item>
          <text:p text:style-name="P15"><text:soft-page-break/>Erstelle danach einen <text:span text:style-name="Strong_20_Emphasis">Zylinder</text:span> als Bohrung.</text:p>
        </text:list-item>
        <text:list-item>
          <text:p text:style-name="P15">Drehe den Zylinder so, dass er eine runde Öffnung oben bildet.</text:p>
        </text:list-item>
        <text:list-item>
          <text:p text:style-name="P15">Gruppiere die Bohrungen mit der Mauer.</text:p>
        </text:list-item>
      </text:list>
      <text:p text:style-name="Text_20_body">So entsteht ein Tor mit Rundbogen.</text:p>
      <text:p text:style-name="Horizontal_20_Line"/>
      <text:h text:style-name="Heading_20_2" text:outline-level="2">10. Ergebnis prüfen</text:h>
      <text:p text:style-name="Text_20_body">Kontrolliere dein Modell:</text:p>
      <text:list text:style-name="L15">
        <text:list-item>
          <text:p text:style-name="P16">Stehen alle Zinnen auf der Mauer?</text:p>
        </text:list-item>
        <text:list-item>
          <text:p text:style-name="P16">Sind die Lücken zwischen den Zinnen ungefähr gleich groß?</text:p>
        </text:list-item>
        <text:list-item>
          <text:p text:style-name="P16">Ist die Burgmauer stabil genug?</text:p>
        </text:list-item>
        <text:list-item>
          <text:p text:style-name="P16">Ist das Tor nicht zu groß?</text:p>
        </text:list-item>
        <text:list-item>
          <text:p text:style-name="P16">Liegt alles auf der Arbeitsfläche?</text:p>
        </text:list-item>
      </text:list>
      <text:p text:style-name="Horizontal_20_Line"/>
      <text:h text:style-name="Heading_20_2" text:outline-level="2">11. Export für den 3D-Druck</text:h>
      <text:p text:style-name="Text_20_body">Wenn dein Modell fertig ist:</text:p>
      <text:list text:style-name="L16">
        <text:list-item>
          <text:p text:style-name="P17">Klicke auf <text:span text:style-name="Strong_20_Emphasis">Exportieren</text:span>.</text:p>
        </text:list-item>
        <text:list-item>
          <text:p text:style-name="P17">Wähle <text:span text:style-name="Strong_20_Emphasis">STL</text:span>.</text:p>
        </text:list-item>
        <text:list-item>
          <text:p text:style-name="P17">Speichere die Datei.</text:p>
        </text:list-item>
      </text:list>
      <text:p text:style-name="Text_20_body">Die STL-Datei kann anschließend in einem Slicer für den 3D-Druck vorbereitet werden.</text:p>
      <text:p text:style-name="Horizontal_20_Line"/>
      <text:h text:style-name="Heading_20_2" text:outline-level="2">Zusatzaufgaben</text:h>
      <text:p text:style-name="Text_20_body">Erweitere deine Burgmauer:</text:p>
      <text:list text:style-name="L17">
        <text:list-item>
          <text:p text:style-name="P18">Baue zwei Türme an die Seiten.</text:p>
        </text:list-item>
        <text:list-item>
          <text:p text:style-name="P18">Erstelle Fenster als Bohrungen.</text:p>
        </text:list-item>
        <text:list-item>
          <text:p text:style-name="P18">Füge eine zweite Mauer hinzu.</text:p>
        </text:list-item>
        <text:list-item>
          <text:p text:style-name="P18">Baue eine komplette Burg.</text:p>
        </text:list-item>
        <text:list-item>
          <text:p text:style-name="P18">Gestalte eine Zugbrücke.</text:p>
        </text:list-item>
        <text:list-item>
          <text:p text:style-name="P18">Schreibe deinen Namen auf ein Schild an der Burgmaue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7T22:36:58.077311600</meta:creation-date>
    <dc:date>2026-06-27T22:37:22.450972800</dc:date>
    <meta:editing-duration>PT24S</meta:editing-duration>
    <meta:editing-cycles>1</meta:editing-cycles>
    <meta:document-statistic meta:table-count="0" meta:image-count="0" meta:object-count="0" meta:page-count="4" meta:paragraph-count="107" meta:word-count="591" meta:character-count="3445" meta:non-whitespace-character-count="3014"/>
    <meta:generator>LibreOffice/26.2.4.2$Windows_X86_64 LibreOffice_project/0229ac93fcf0d7cbc6376066c6f35021cef002dc</meta:generator>
  </office:meta>
</office:document-meta>
</file>